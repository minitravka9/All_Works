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language="en" fo:country="US" officeooo:rsid="000e0f55"/>
    </style:style>
    <style:style style:name="T2" style:family="text">
      <style:text-properties fo:language="en" fo:country="US" fo:font-weight="bold" officeooo:rsid="000e0f55" style:font-weight-asian="bold" style:font-weight-complex="bold"/>
    </style:style>
    <style:style style:name="T3" style:family="text">
      <style:text-properties officeooo:rsid="000e0f55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</text:p>
      <text:p text:style-name="P2"><text:span text:style-name="T4">MARK</text:span><text:span text:style-name="T2">:</text:span> Rachel? You OK?</text:p>
      <text:p text:style-name="P2"><text:span text:style-name="T4">RACHEL:</text:span> Oh, I'm sorry, love. I'm just a bit worried, Jo phoned today and said that the old bookshop is going to be turned into another florist's.</text:p>
      <text:p text:style-name="P2"><text:span text:style-name="T4">M</text:span><text:span text:style-name="T2">ARK:</text:span> The bookshop on the corner? I didn't know they'd sold it.</text:p>
      <text:p text:style-name="P2"><text:span text:style-name="T4">R</text:span><text:span text:style-name="T2">ACHEL:</text:span> Me neither, What am I going to do? It's hard enough already to make money, but I think it's going to be impossible with another florist's in the same street.</text:p>
      <text:p text:style-name="P2"><text:span text:style-name="T4">M</text:span><text:span text:style-name="T2">ARK:</text:span> Yeah, Was Jo sure about this?</text:p>
      <text:p text:style-name="P2"><text:span text:style-name="T4">R</text:span><text:span text:style-name="T2">ACHEL:</text:span> I don't know. She seemed pretty certain.</text:p>
      <text:p text:style-name="P2"><text:span text:style-name="T4">M</text:span><text:span text:style-name="T2">ARK:</text:span> Well, if you ask me, it's not worth worrying about until we know for sure.</text:p>
      <text:p text:style-name="P2"><text:span text:style-name="T4">R</text:span><text:span text:style-name="T2">ACHEL:</text:span> I know, but I can't help it - it's on my mind. I was even rude to a customer today.</text:p>
      <text:p text:style-name="P2"><text:span text:style-name="T4">M</text:span><text:span text:style-name="T2">ARK:</text:span> Really? That's not like you. What happened?</text:p>
      <text:p text:style-name="P2"><text:span text:style-name="T4">R</text:span><text:span text:style-name="T2">ACHEL:</text:span> Well I wasn't exactly rude, just not very helpful.</text:p>
      <text:p text:style-name="P2"><text:span text:style-name="T4">M</text:span><text:span text:style-name="T2">ARK:</text:span> Hey, don't worry about it. Let's just forget about work. Personally, I need a relaxing evening!</text:p>
      <text:p text:style-name="P2"><text:span text:style-name="T4">R</text:span><text:span text:style-name="T2">ACHEL:</text:span> Me too!</text:p>
      <text:p text:style-name="P2"><text:span text:style-name="T4">M</text:span><text:span text:style-name="T2">ARK:</text:span> Anyway, Tom and Becky will be here in a minute. I think we should check or the food.</text:p>
      <text:p text:style-name="P2"><text:span text:style-name="T4">R</text:span><text:span text:style-name="T2">ACHEL:</text:span> Yes. I don't want anything else to go wrong today. So, what's Becky like?</text:p>
      <text:p text:style-name="P2"><text:span text:style-name="T4">M</text:span><text:span text:style-name="T2">ARK:</text:span> That'll be them now!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3:06:04.243000000</meta:creation-date>
    <meta:print-date>2025-12-05T23:18:28.404000000</meta:print-date>
    <dc:date>2025-12-05T23:25:30.987000000</dc:date>
    <meta:editing-duration>PT9M5S</meta:editing-duration>
    <meta:editing-cycles>1</meta:editing-cycles>
    <meta:document-statistic meta:table-count="0" meta:image-count="0" meta:object-count="0" meta:page-count="1" meta:paragraph-count="16" meta:word-count="205" meta:character-count="1074" meta:non-whitespace-character-count="885"/>
    <meta:generator>LibreOffice/24.2.5.2$Windows_X86_64 LibreOffice_project/bffef4ea93e59bebbeaf7f431bb02b1a39ee8a59</meta:generator>
  </office:meta>
</office:document-meta>
</file>