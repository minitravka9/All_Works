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pple-system, BlinkMacSystemFont, Arial, Helvetica, 'Arial Unicode MS', sans-serif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fo:language="en" fo:country="US" officeooo:rsid="001a53c2" officeooo:paragraph-rsid="001a53c2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officeooo:rsid="001a53c2" officeooo:paragraph-rsid="001a53c2"/>
    </style:style>
    <style:style style:name="P3" style:family="paragraph" style:parent-style-name="Standard">
      <style:text-properties officeooo:paragraph-rsid="001a53c2"/>
    </style:style>
    <style:style style:name="T1" style:family="text">
      <style:text-properties officeooo:rsid="001a53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officeooo:rsid="001a53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 2</text:p>
      <text:p text:style-name="Standard"><text:span text:style-name="T2">RACHEL:</text:span> How's the phone?</text:p>
      <text:p text:style-name="Standard"><text:span text:style-name="T2">BECKY: </text:span>Not good. The screen's frozen.</text:p>
      <text:p text:style-name="Standard"><text:span text:style-name="T2">R: </text:span>Oh dear! Have you tried turning it off and on again?</text:p>
      <text:p text:style-name="Standard"><text:span text:style-name="T2">B:</text:span> I was just doing that, but still nothing.</text:p>
      <text:p text:style-name="Standard"><text:span text:style-name="T2">R:</text:span> What about taking the SIM card out and drying it?</text:p>
      <text:p text:style-name="Standard"><text:span text:style-name="T2">B: </text:span>That's worth a try. Thank you. Oh, I hope I haven't lost all my contacts. I haven't saved them anywhere else.</text:p>
      <text:p text:style-name="Standard"><text:span text:style-name="T2">R:</text:span> Oh no, how awful. Could you take it back to the shop?</text:p>
      <text:p text:style-name="Standard"><text:span text:style-name="T2">B:</text:span> Oh, I don't think they'll do anything. I bought it over a year ago.</text:p>
      <text:p text:style-name="Standard"><text:span text:style-name="T2">R: </text:span>Can you claim on your insurance?</text:p>
      <text:p text:style-name="Standard"><text:span text:style-name="T2">B:</text:span> I don't have any. It's just run out. A week ago!</text:p>
      <text:p text:style-name="Standard"><text:span text:style-name="T2">R: </text:span>How annoying! I know, the other day I read about this trick for fixing phones that have got wet.</text:p>
      <text:p text:style-name="Standard"><text:span text:style-name="T2">B: </text:span>Oh yes?</text:p>
      <text:p text:style-name="Standard"><text:span text:style-name="T2">R:</text:span> They said you put the phone in a bag of rice and apparently it dries it out. You could try that.</text:p>
      <text:p text:style-name="P1"><text:span text:style-name="T2">B:</text:span> That sounds a bit weird.</text:p>
      <text:p text:style-name="Standard"><text:span text:style-name="T2">R:</text:span> I know, but there were lots of comments from people saying that it had worked.</text:p>
      <text:p text:style-name="Standard"><text:span text:style-name="T2">B:</text:span> OK, I'll give it a try. What have I got to lose?</text:p>
      <text:p text:style-name="Standard"><text:span text:style-name="T2">R:</text:span> Exactly, it's cheaper than buying a new phone!</text:p>
      <text:p text:style-name="Standard"/>
      <text:p text:style-name="P3"><text:span text:style-name="T3">PART 2 </text:span></text:p>
      <text:p text:style-name="Standard">RACHEL: Как твой телефон?</text:p>
      <text:p text:style-name="Standard">BECKY: Не очень. Экран завис.</text:p>
      <text:p text:style-name="Standard">R: Ой-ой! Ты пробовала выключить и включить его снова?</text:p>
      <text:p text:style-name="Standard">B: Я как раз это делала, но всё равно ничего.</text:p>
      <text:p text:style-name="Standard">R: А что насчёт того, чтобы вынуть SIM-карту и высушить её?</text:p>
      <text:p text:style-name="Standard">B: Стоит попробовать. Спасибо. Ох, надеюсь, я не потеряла все свои контакты. Я нигде больше их не сохранила.</text:p>
      <text:p text:style-name="Standard">R: О нет, как ужасно. Ты могла бы отнести его обратно в магазин?</text:p>
      <text:p text:style-name="Standard">B: О, не думаю, что они что-то сделают. Я купила его больше года назад.</text:p>
      <text:p text:style-name="Standard">R: Ты можешь обратиться за страховкой?</text:p>
      <text:p text:style-name="Standard">B: У меня нет страховки. Она только что закончилась. Неделю назад!</text:p>
      <text:p text:style-name="Standard">R: Как досадно! Знаешь, на днях я читала об одном трюке для починки телефонов, которые намокли.</text:p>
      <text:p text:style-name="Standard">B: Да неужели?</text:p>
      <text:p text:style-name="Standard">R: Они сказали, что нужно положить телефон в пакет с рисом, и он якобы высушивает его. Ты можешь попробовать.</text:p>
      <text:p text:style-name="Standard">B: Это звучит немного странно.</text:p>
      <text:p text:style-name="Standard">R: Знаю, но было много комментариев от людей, которые сказали, что это сработало.</text:p>
      <text:p text:style-name="Standard">B: Ладно, я попробую. Что я теряю?</text:p>
      <text:p text:style-name="Standard">R: Именно, это дешевле, чем покупать новый телефон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pple-system, BlinkMacSystemFont, Arial, Helvetica, 'Arial Unicode MS', sans-serif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07T17:33:51.247000000</meta:creation-date>
    <dc:date>2026-05-07T17:45:41.959000000</dc:date>
    <meta:editing-duration>PT18S</meta:editing-duration>
    <meta:editing-cycles>1</meta:editing-cycles>
    <meta:document-statistic meta:table-count="0" meta:image-count="0" meta:object-count="0" meta:page-count="1" meta:paragraph-count="36" meta:word-count="376" meta:character-count="1938" meta:non-whitespace-character-count="1597"/>
    <meta:generator>LibreOffice/24.2.5.2$Windows_X86_64 LibreOffice_project/bffef4ea93e59bebbeaf7f431bb02b1a39ee8a59</meta:generator>
  </office:meta>
</office:document-meta>
</file>