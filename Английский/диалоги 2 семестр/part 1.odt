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Standard">
      <style:text-properties fo:language="en" fo:country="US" officeooo:rsid="0014307a" officeooo:paragraph-rsid="0014307a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4307a" officeooo:paragraph-rsid="0014307a"/>
    </style:style>
    <style:style style:name="P3" style:family="paragraph" style:parent-style-name="Standard">
      <style:text-properties fo:language="ru" fo:country="RU" officeooo:rsid="0014307a" officeooo:paragraph-rsid="0014307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1</text:p>
      <text:p text:style-name="P1"><text:span text:style-name="T1">RACHEL:</text:span> Oh, hi Becky! </text:p>
      <text:p text:style-name="P1"><text:span text:style-name="T1">BECKY:</text:span> Oh, hi Rachel.</text:p>
      <text:p text:style-name="P1"><text:span text:style-name="T1">B:</text:span> Oh no!</text:p>
      <text:p text:style-name="P1"><text:span text:style-name="T1">R: </text:span>Oh! Oh Becky, I'm so sorry.</text:p>
      <text:p text:style-name="P1"><text:span text:style-name="T1">B: </text:span>But why? It was me that knocked it over.</text:p>
      <text:p text:style-name="P1"><text:span text:style-name="T1">R:</text:span> But I distracted you.</text:p>
      <text:p text:style-name="P1"><text:span text:style-name="T1">B:</text:span> What, by saying hello? Don't worry about it! It was my fault.</text:p>
      <text:p text:style-name="P1"><text:span text:style-name="T1">R:</text:span> At least let me get you another orange juice!</text:p>
      <text:p text:style-name="P3"/>
      <text:p text:style-name="P1">PART 1 </text:p>
      <text:p text:style-name="P1">Рэйчел: О, привет, Бекки!</text:p>
      <text:p text:style-name="P1">Бекки: Привет, Рэйчел!</text:p>
      <text:p text:style-name="P1">Рэйчел: О нет!</text:p>
      <text:p text:style-name="P1">Бекки: О, Бекки, мне так жаль.</text:p>
      <text:p text:style-name="P1">Рэйчел: Но почему? Это я тебя отвлекла.</text:p>
      <text:p text:style-name="P1">Бекки: Что, сказав «привет»? Не переживай об этом! Это была моя вина.</text:p>
      <text:p text:style-name="P1">Рэйчел: По крайней мере, позволь мне принести тебе еще один апельсиновый сок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17:29:22.546000000</meta:creation-date>
    <dc:date>2026-05-07T17:33:37.005000000</dc:date>
    <meta:editing-duration>PT4M14S</meta:editing-duration>
    <meta:editing-cycles>1</meta:editing-cycles>
    <meta:document-statistic meta:table-count="0" meta:image-count="0" meta:object-count="0" meta:page-count="1" meta:paragraph-count="17" meta:word-count="107" meta:character-count="550" meta:non-whitespace-character-count="458"/>
    <meta:generator>LibreOffice/24.2.5.2$Windows_X86_64 LibreOffice_project/bffef4ea93e59bebbeaf7f431bb02b1a39ee8a59</meta:generator>
  </office:meta>
</office:document-meta>
</file>