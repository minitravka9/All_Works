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YS Text" svg:font-family="'YS Text', apple-system, BlinkMacSystemFont, Arial, Helvetica, 'Arial Unicode MS', sans-serif"/>
  </office:font-face-decls>
  <office:automatic-styles>
    <style:style style:name="P1" style:family="paragraph" style:parent-style-name="Standard">
      <style:text-properties officeooo:paragraph-rsid="000f4c14"/>
    </style:style>
    <style:style style:name="P2" style:family="paragraph" style:parent-style-name="Standard">
      <style:text-properties fo:language="en" fo:country="US" officeooo:rsid="000f4c14" officeooo:paragraph-rsid="000f4c14"/>
    </style:style>
    <style:style style:name="P3" style:family="paragraph" style:parent-style-name="Standard">
      <style:text-properties fo:language="en" fo:country="US" style:text-underline-style="solid" style:text-underline-width="auto" style:text-underline-color="font-color" fo:font-weight="normal" officeooo:rsid="000f4c14" officeooo:paragraph-rsid="000f4c14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ART 3</text:p>
      <text:p text:style-name="P1"><text:span text:style-name="T1">RACHEL:</text:span> Hello. Fantastic Flowers. </text:p>
      <text:p text:style-name="P1"><text:span text:style-name="T1">BECKY:</text:span> Hi Rachel, it's Becky.</text:p>
      <text:p text:style-name="Standard"><text:span text:style-name="T1">R:</text:span> Oh, hi Becky. How are you?</text:p>
      <text:p text:style-name="Standard"><text:span text:style-name="T1">B:</text:span> I'm good and guess what? My phone's working. That rice trick worked.</text:p>
      <text:p text:style-name="Standard"><text:span text:style-name="T1">R:</text:span> That's brilliant! I'm really glad to hear that.</text:p>
      <text:p text:style-name="P2"/>
      <text:p text:style-name="P2">PART 3</text:p>
      <text:p text:style-name="Standard">Рэйчел: Привет. Фантастические цветы.</text:p>
      <text:p text:style-name="Standard">Бекки: Привет, Рэйчел. Это Бекки.</text:p>
      <text:p text:style-name="Standard">Рэйчел: О, привет, Бекки. Как дела?</text:p>
      <text:p text:style-name="Standard">Бекки: У меня всё хорошо, и угадай что? Мой телефон работает. Трюк с рисом сработал.</text:p>
      <text:p text:style-name="Standard">Рэйчел: Это здорово! Я очень рада это слышать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YS Text" svg:font-family="'YS Text', apple-system, BlinkMacSystemFont, Arial, Helvetica, 'Arial Unicode M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5-07T17:53:04.548000000</meta:creation-date>
    <dc:date>2026-05-07T20:26:05.267000000</dc:date>
    <meta:editing-duration>PT2H22M48S</meta:editing-duration>
    <meta:editing-cycles>1</meta:editing-cycles>
    <meta:document-statistic meta:table-count="0" meta:image-count="0" meta:object-count="0" meta:page-count="1" meta:paragraph-count="12" meta:word-count="80" meta:character-count="460" meta:non-whitespace-character-count="391"/>
    <meta:generator>LibreOffice/24.2.5.2$Windows_X86_64 LibreOffice_project/bffef4ea93e59bebbeaf7f431bb02b1a39ee8a59</meta:generator>
  </office:meta>
</office:document-meta>
</file>