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YS Text" svg:font-family="'YS Text', Arial, Helvetica, 'Arial Unicode MS', sans-serif"/>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fo:font-weight="bold" style:font-size-asian="14pt" style:font-weight-asian="bold" style:font-size-complex="14pt" style:font-weight-complex="bold"/>
    </style:style>
    <style:style style:name="T1" style:family="text">
      <style:text-properties fo:language="en" fo:country="US" officeooo:rsid="001e65a5"/>
    </style:style>
    <style:style style:name="T2" style:family="text">
      <style:text-properties fo:language="en" fo:country="US" fo:font-weight="bold" officeooo:rsid="001e65a5" style:font-weight-asian="bold" style:font-weight-complex="bold"/>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isual learners</text:p>
      <text:p text:style-name="P1"/>
      <text:p text:style-name="P1">They prefer to learn by seeing or reading things and need to see new information written down.</text:p>
      <text:p text:style-name="P1"/>
      <text:p text:style-name="P2">Auditory learners</text:p>
      <text:p text:style-name="P1"/>
      <text:p text:style-name="P1">They prefer to learn by listening to new information. They also like to talk about the new things they've learnt.</text:p>
      <text:p text:style-name="P1"/>
      <text:p text:style-name="P2">Kinaesthetic learners</text:p>
      <text:p text:style-name="P1"/>
      <text:p text:style-name="P1">They prefer to learn by doing something. They don't like sitting still for very long.</text:p>
      <text:p text:style-name="P1"/>
      <text:p text:style-name="P2">VISUAL LEARNERS</text:p>
      <text:p text:style-name="P1">It helps to study in a quiet place so that you can concentrate. To learn new information, try to think of an image in your head, or make a diagram to highlight different points. 'This technique helps your memory and it means you can find the information easily when you look at your notes again.</text:p>
      <text:p text:style-name="P1"/>
      <text:p text:style-name="P2">AUDITORY LEARNERS</text:p>
      <text:p text:style-name="P1">Going to a lecture is a good way for you to learn. Read your notes aloud, then cover them and try to say them again from memory. Also, try to use new words when you're talking to people. If you are studying words on a particular topic, you can listen to podcasts that include this vocabulary. These ideas should help you remember what you need to know.</text:p>
      <text:p text:style-name="P1"/>
      <text:p text:style-name="P2">KINAESTHETIC LEARNERS</text:p>
      <text:p text:style-name="P1">In order to learn new information, you need to be doing something. It helps to study in a place where you can walk around the room, touch things and move as freely as possible. Make sure you take regular breaks and go for a walk. This will help you to concentrate and remain interested in what you are studying.</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YS Text" svg:font-family="'YS Text', Arial, Helvetica,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2-13T15:39:11.263000000</meta:creation-date>
    <dc:date>2025-12-20T23:21:09.465000000</dc:date>
    <meta:editing-duration>PT8M29S</meta:editing-duration>
    <meta:editing-cycles>2</meta:editing-cycles>
    <meta:generator>LibreOffice/24.2.5.2$Windows_X86_64 LibreOffice_project/bffef4ea93e59bebbeaf7f431bb02b1a39ee8a59</meta:generator>
    <meta:document-statistic meta:table-count="0" meta:image-count="0" meta:object-count="0" meta:page-count="1" meta:paragraph-count="12" meta:word-count="245" meta:character-count="1356" meta:non-whitespace-character-count="1123"/>
  </office:meta>
</office:document-meta>
</file>