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pple-system, BlinkMacSystemFont, Arial, Helvetica, 'Arial Unicode MS', sans-serif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text-properties fo:font-size="7pt" officeooo:paragraph-rsid="001a2fd7" style:font-size-asian="7pt" style:font-size-complex="7pt"/>
    </style:style>
    <style:style style:name="T1" style:family="text">
      <style:text-properties fo:font-variant="normal" fo:text-transform="none" fo:color="#ffffff" loext:opacity="100%" style:font-name="YS Text" fo:font-size="10.5pt" fo:letter-spacing="normal" fo:font-style="normal" fo:font-weight="normal"/>
    </style:style>
    <style:style style:name="T2" style:family="text">
      <style:text-properties officeooo:rsid="0019e7e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9e7e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first exam period at the university.</text:p>
      <text:p text:style-name="P3">At the beginning of my first exam period, I wasn't worried because I had </text:p>
      <text:p text:style-name="P3">already written many tests during my school years, and I thought I had </text:p>
      <text:p text:style-name="P3">experience with such stages. However, when I started subjects for which </text:p>
      <text:p text:style-name="P3">I didn't have an automatic grade, I faced difficulties. For the history exam,</text:p>
      <text:p text:style-name="P3"><text:s/>I had to study 40 questions from 862 to 1917, and for the math analysis </text:p>
      <text:p text:style-name="P3">exam, I had to study 49 questions with a lot of theorems. At that moment,</text:p>
      <text:p text:style-name="P3"><text:s/>I started to worry about not being able to prepare for everything. My </text:p>
      <text:p text:style-name="P3">usual day consisted of getting up at 10 a.m., doing household chores for</text:p>
      <text:p text:style-name="P3"><text:s/>2 hours, studying for exams for 2 hours, playing volleyball for 3 hours,</text:p>
      <text:p text:style-name="P3"><text:s/>then studying for exams for another 3 hours, and spending time with my </text:p>
      <text:p text:style-name="P3">girlfriend, watching TV shows, and relaxing. Most importantly, I was able</text:p>
      <text:p text:style-name="P3"><text:s/>to complete the session without retakes, although it wasn't perfect, with </text:p>
      <text:p text:style-name="P3">a 3 in mathematical analysis and the rest being 4s. However, I gained </text:p>
      <text:p text:style-name="P3">invaluable experience in preparing for exams in advance. In the<text:span text:style-name="T3"> </text:span><text:span text:style-name="T4">new</text:span><text:span text:style-name="T3"> </text:span></text:p>
      <text:p text:style-name="P3">semester, I will strive to dedicate more time to each subject and prepare </text:p>
      <text:p text:style-name="P3">for exams from the beginning of my studi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pple-system, BlinkMacSystemFont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0T23:21:46.487000000</meta:creation-date>
    <meta:print-date>2026-02-11T00:03:49.635000000</meta:print-date>
    <dc:date>2026-02-11T00:04:24.683000000</dc:date>
    <meta:editing-duration>PT18M30S</meta:editing-duration>
    <meta:editing-cycles>1</meta:editing-cycles>
    <meta:document-statistic meta:table-count="0" meta:image-count="0" meta:object-count="0" meta:page-count="1" meta:paragraph-count="17" meta:word-count="207" meta:character-count="1169" meta:non-whitespace-character-count="964"/>
    <meta:generator>LibreOffice/24.2.5.2$Windows_X86_64 LibreOffice_project/bffef4ea93e59bebbeaf7f431bb02b1a39ee8a59</meta:generator>
  </office:meta>
</office:document-meta>
</file>