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e13b" officeooo:paragraph-rsid="0010e13b"/>
    </style:style>
    <style:style style:name="P2" style:family="paragraph" style:parent-style-name="Standard">
      <style:text-properties fo:language="ru" fo:country="RU" fo:font-weight="bold" officeooo:rsid="0010e13b" officeooo:paragraph-rsid="0010e13b" style:font-weight-asian="bold" style:font-weight-complex="bold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исьмо</text:p>
      <text:p text:style-name="P1"/>
      <text:p text:style-name="P1">Hi, Martina </text:p>
      <text:p text:style-name="P1"><text:tab/>I’m sorry. I didn’t reply <text:s/>to your last email sooner but I’ve been very busy for the last two weeks. Ten days ago I finished writing my new book and sent it to some London publishing companies. You won’t believe this, but one of the companies have just offered me a contract!</text:p>
      <text:p text:style-name="P1"><text:tab/>The contract sounds brilliant but they asked me to make some changes in the novel to be more interesting for young people. So, I’m going to work with pay me a lot of money. I hope I will be able to stop teaching and spend all my time on writing</text:p>
      <text:p text:style-name="P1"><text:tab/>But the best part is that I’m travelling to New York next month. I’m looking forward it because it’s my <text:s/>first trip in the USA. I’m going to meet American editors and Holywood film producers there – they might make <text:s/>the book into a film</text:p>
      <text:p text:style-name="P1"><text:tab/>We must get together before I start working with editor<text:span text:style-name="T1">, </text:span>so why don’t we meet up for dinner these weekend. Do you want to try that New Italian restaurant in the centre? Let me know the time that suits you.</text:p>
      <text:p text:style-name="P1"/>
      <text:p text:style-name="P1"><text:tab/>Best wishes,</text:p>
      <text:p text:style-name="P1"/>
      <text:p text:style-name="P2">Перевод</text:p>
      <text:p text:style-name="P1"/>
      <text:p text:style-name="P1">Привет, Мартина </text:p>
      <text:p text:style-name="P1"><text:tab/>Мне жаль. Я не ответила на твое последнее письмо раньше, но последние две недели была очень занята. Десять дней назад я закончила писать свою новую книгу и отправила ее в несколько лондонских издательств. Вы не поверите, но одна из компаний только что предложила мне контракт!</text:p>
      <text:p text:style-name="P1"><text:tab/>Контракт звучит блестяще, но они попросили меня внести некоторые изменения в роман, чтобы он был более интересным для молодежи. Итак, я собираюсь работать с "плати мне много денег". Я надеюсь, что смогу перестать преподавать и посвятить все свое время писательству</text:p>
      <text:p text:style-name="P1"><text:tab/>Но самое приятное то, что в следующем месяце я еду в Нью-Йорк. Я с нетерпением жду этого, потому что это моя первая поездка в США. Я собираюсь встретиться там с американскими редакторами и голивудскими кинопродюсерами – возможно, они превратят книгу в фильм.</text:p>
      <text:p text:style-name="P1"><text:tab/>Мы должны встретиться до того, как я начну работать с редактором, так почему бы нам не поужинать вместе в эти выходные? Хочешь попробовать новый итальянский ресторан в центре? Дайте мне знать, когда вам будет удобно.</text:p>
      <text:p text:style-name="P1"/>
      <text:p text:style-name="P1"><text:tab/>Наилучшие пожелания,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6T16:50:16.335000000</meta:creation-date>
    <meta:print-date>2026-05-26T17:06:23.052000000</meta:print-date>
    <dc:date>2026-05-26T17:06:56.141000000</dc:date>
    <meta:editing-duration>PT29S</meta:editing-duration>
    <meta:editing-cycles>1</meta:editing-cycles>
    <meta:document-statistic meta:table-count="0" meta:image-count="0" meta:object-count="0" meta:page-count="1" meta:paragraph-count="14" meta:word-count="357" meta:character-count="2057" meta:non-whitespace-character-count="1697"/>
    <meta:generator>LibreOffice/24.2.5.2$Windows_X86_64 LibreOffice_project/bffef4ea93e59bebbeaf7f431bb02b1a39ee8a59</meta:generator>
  </office:meta>
</office:document-meta>
</file>