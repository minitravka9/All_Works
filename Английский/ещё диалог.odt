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text-underline-style="solid" style:text-underline-width="auto" style:text-underline-color="font-color" officeooo:rsid="00097ec2" officeooo:paragraph-rsid="00097e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7ec2" style:font-weight-asian="bold" style:font-weight-complex="bold"/>
    </style:style>
    <style:style style:name="T3" style:family="text">
      <style:text-properties officeooo:rsid="00097e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T 2</text:span></text:p>
      <text:p text:style-name="Standard"><text:span text:style-name="T1">TOM:</text:span> So, what did you do?</text:p>
      <text:p text:style-name="Standard"><text:span text:style-name="T1">MARK: </text:span>Well, I phoned the company to explain, and luckily they agreed to give me a refund.</text:p>
      <text:p text:style-name="Standard"><text:span text:style-name="T1">T: </text:span>Really? That was very good of them.</text:p>
      <text:p text:style-name="Standard"><text:span text:style-name="T1">M:</text:span> Yeah, it was: But anyway, I still had to find a desk. I was looking everywhere, but I couldn't find anything, In the end, Rachel suggested I try one of those freecycling websites.</text:p>
      <text:p text:style-name="Standard"><text:span text:style-name="T1">T: </text:span>Freecycling? What's that?</text:p>
      <text:p text:style-name="Standard"><text:span text:style-name="T1">M:</text:span> It's where people get rid of stulf they don't want any more. I've never heard of it either, But there are a couple of websites for this area. I found the perfect desk straight away - and the best thing is, it's free</text:p>
      <text:p text:style-name="Standard"><text:span text:style-name="T1">T: </text:span>It's free?</text:p>
      <text:p text:style-name="Standard"><text:span text:style-name="T1">M:</text:span> Yeah, I think the owner doesn't have enough space for it, so he's just giving it away. So all I have to do is go and pick it up.</text:p>
      <text:p text:style-name="Standard"><text:span text:style-name="T1">T:</text:span> Wow! That's good. And you're sure it's the right size this time?</text:p>
      <text:p text:style-name="Standard"><text:span text:style-name="T1">M:</text:span> Ha-ha. Yeah, I double-checked the measurements this time.</text:p>
      <text:p text:style-name="Standard"><text:span text:style-name="T1">P:</text:span> Guys!</text:p>
      <text:p text:style-name="Standard"><text:span text:style-name="T1">M: </text:span>Oh, sorry, Paula! It's my fault. I was just explaining to Tom about my desk mix-up.</text:p>
      <text:p text:style-name="Standard"/>
      <text:p text:style-name="Standard"/>
      <text:p text:style-name="Standard">ЧАСТЬ 2 <text:line-break/><text:span text:style-name="T1">ТОМ:</text:span> <text:span text:style-name="T3">И</text:span> что же ты сделал? <text:line-break/><text:span text:style-name="T1">МАРК:</text:span> <text:span text:style-name="T3">Я</text:span> позвонил в компанию, чтобы все объяснить, и, к счастью, они согласились вернуть мне деньги. <text:line-break/><text:span text:style-name="T2">Т:</text:span><text:span text:style-name="T3"> </text:span>Правда? Это было очень любезно с их стороны. <text:line-break/><text:span text:style-name="T2">М:</text:span><text:span text:style-name="T3"> </text:span>М-да, так оно и было, но в любом случае, мне все равно нужно было найти рабочее место. Я искал везде, но ничего не мог найти, в конце концов, Рейчел предложила мне попробовать один из сайтов, посвященных фрициклингу. <text:line-break/><text:span text:style-name="T2">Т:</text:span> Фрициклинг? Что это такое? <text:line-break/><text:span text:style-name="T2">М: </text:span>Это место, где люди избавляются от ненужных им забот. Я тоже никогда об этом не слышал, но есть пара сайтов, посвященных этой теме. Я сразу же нашел идеальный стол, и, что самое приятное, он бесплатный <text:line-break/><text:span text:style-name="T2">Т:</text:span><text:span text:style-name="T3"> </text:span>Это бесплатно? <text:line-break/><text:span text:style-name="T2">М:</text:span><text:span text:style-name="T3"> </text:span>М-да, я думаю, у владельца недостаточно места для этого, поэтому он просто раздает его. Так что все, что мне нужно сделать, это пойти и забрать его. <text:line-break/><text:span text:style-name="T2">Т:</text:span><text:span text:style-name="T3"> </text:span>Ого! Это хорошо. А ты уверена, что на этот раз размер подошел? <text:line-break/><text:span text:style-name="T2">М:</text:span><text:span text:style-name="T3"> </text:span>Ха-ха-ха. Да, на этот раз я перепроверила мерки. <text:line-break/><text:span text:style-name="T2">П:</text:span><text:span text:style-name="T3"> </text:span>Ребята! <text:line-break/><text:span text:style-name="T2">М:</text:span><text:span text:style-name="T3"> </text:span>О, прости, Пола! Это я виноват. Я как раз объяснял Тому, что перепутал сто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31T12:17:52.067000000</meta:creation-date>
    <meta:print-date>2026-05-31T12:22:01.976000000</meta:print-date>
    <dc:date>2026-05-31T12:22:36.400000000</dc:date>
    <meta:editing-duration>PT4M45S</meta:editing-duration>
    <meta:editing-cycles>1</meta:editing-cycles>
    <meta:document-statistic meta:table-count="0" meta:image-count="0" meta:object-count="0" meta:page-count="1" meta:paragraph-count="14" meta:word-count="370" meta:character-count="1977" meta:non-whitespace-character-count="1609"/>
    <meta:generator>LibreOffice/24.2.5.2$Windows_X86_64 LibreOffice_project/bffef4ea93e59bebbeaf7f431bb02b1a39ee8a59</meta:generator>
  </office:meta>
</office:document-meta>
</file>