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 style:writing-mode="lr-tb"/>
    </style:style>
    <style:style style:name="P2" style:family="paragraph" style:parent-style-name="Heading_20_3">
      <style:paragraph-properties fo:text-align="justify" style:justify-single-word="false" style:writing-mode="lr-tb"/>
    </style:style>
    <style:style style:name="P3" style:family="paragraph" style:parent-style-name="Standard">
      <style:paragraph-properties fo:line-height="150%" fo:text-align="center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language="ru" fo:country="RU" style:language-asian="ru" style:country-asian="RU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Text_20_body" style:list-style-name="WWNum1">
      <style:paragraph-properties fo:margin-left="0cm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7" style:family="paragraph" style:parent-style-name="Text_20_body" style:list-style-name="WWNum2">
      <style:paragraph-properties fo:margin-left="0cm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8" style:family="paragraph" style:parent-style-name="Text_20_body" style:list-style-name="WWNum3">
      <style:paragraph-properties fo:margin-left="0cm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9" style:family="paragraph" style:parent-style-name="Text_20_body" style:list-style-name="WWNum4">
      <style:paragraph-properties fo:margin-left="0cm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10" style:family="paragraph" style:parent-style-name="Text_20_body" style:list-style-name="">
      <style:paragraph-properties fo:margin-left="0cm" fo:text-align="justify" style:justify-single-word="false" fo:text-indent="0cm" style:auto-text-indent="false" style:writing-mode="lr-tb"/>
    </style:style>
    <style:style style:name="P11" style:family="paragraph" style:parent-style-name="Text_20_body" style:list-style-name="">
      <style:paragraph-properties fo:margin-lef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">
      <style:paragraph-properties fo:margin-left="0cm" fo:text-align="justify" style:justify-single-word="false" fo:text-indent="0cm" style:auto-text-indent="false" style:writing-mode="lr-tb"/>
      <style:text-properties fo:language="en" fo:country="US"/>
    </style:style>
    <style:style style:name="P13" style:family="paragraph" style:parent-style-name="Text_20_body">
      <style:paragraph-properties fo:text-align="start" style:justify-single-word="false" style:writing-mode="lr-tb"/>
      <style:text-properties fo:language="en" fo:country="US"/>
    </style:style>
    <style:style style:name="P14" style:family="paragraph" style:parent-style-name="Text_20_body">
      <style:paragraph-properties fo:margin-top="0.494cm" fo:margin-bottom="0.494cm" style:contextual-spacing="false" fo:line-height="150%" fo:text-align="start" style:justify-single-word="false" style:writing-mode="lr-tb"/>
      <style:text-properties fo:font-variant="normal" fo:text-transform="none" fo:color="#1a1a1a" loext:opacity="100%" fo:letter-spacing="normal" fo:font-style="normal" style:font-style-asian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fo:language="ru" fo:country="RU" style:font-size-asian="18pt" style:font-name-complex="Times New Roman1" style:font-size-complex="18pt"/>
    </style:style>
    <style:style style:name="T3" style:family="text">
      <style:text-properties style:font-name="Times New Roman" fo:font-size="18pt" style:font-size-asian="18pt" style:font-size-complex="18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en" fo:country="US" fo:font-weight="normal" style:font-size-asian="14pt" style:language-asian="ru" style:country-asian="RU" style:font-weight-asian="normal" style:font-size-complex="14pt" style:font-weight-complex="normal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13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language="ru" fo:country="RU" style:language-asian="ru" style:country-asian="RU"/>
    </style:style>
    <style:style style:name="T16" style:family="text">
      <style:text-properties fo:language="en" fo:country="US"/>
    </style:style>
    <style:style style:name="T17" style:family="text">
      <style:text-properties fo:language="ru" fo:country="RU" style:language-asian="ru" style:country-asian="RU"/>
    </style:style>
    <style:style style:name="T18" style:family="text">
      <style:text-properties fo:font-variant="normal" fo:text-transform="none" fo:color="#1a1a1a" loext:opacity="100%" fo:letter-spacing="normal" fo:font-style="normal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text:span text:style-name="T2">Блез Паскаль: личность и вклад в развитие информатики</text:span><text:span text:style-name="T2"/></text:p>
      <text:h text:style-name="P2" text:outline-level="3" loext:marker-style-name="T4"><text:span text:style-name="T4">1. Введение</text:span><text:span text:style-name="T4"/></text:h>
      <text:p text:style-name="P5" loext:marker-style-name="T4"><text:span text:style-name="T4"><text:tab/>Блез Паскаль — один из величайших умов XVII века, чьи работы заложили основы современной информатики. Его изобретения и идеи оказали большое значение на развитие вычислительной техники, а его философские труды демонстрируют глубину мышления, редкую для учёного-энциклопедиста. В этом реферате рассматривается личность Паскаля, его ключевое изобретение — механическая вычислительная машина «Паскалина» — и его влияние на компьютерные науки.</text:span><text:span text:style-name="T4"/></text:p>
      <text:h text:style-name="P2" text:outline-level="3" loext:marker-style-name="T4"><text:span text:style-name="T4">2. Биография Блеза Паскаля: гений науки и философии</text:span><text:span text:style-name="T4"/></text:h>
      <text:p text:style-name="P5" loext:marker-style-name="T4"><text:span text:style-name="T4"><text:tab/>Блез Паскаль (1623–1662) родился в Клермон-Ферране (Франция) в семье образованного юриста и налогового чиновника. Его мать умерла, когда ему было три года, и воспитанием мальчика занялся отец — Этьен Паскаль, который сам был математиком. Уже в детстве Паскаль проявил невероятные интеллектуальные навыки. По свидетельствам современников, он самостоятельно вывел многие геометрические теоремы, ещё не зная их официальных названий. . Уже в 16 лет он доказал теорему о «таинственном шестиугольнике», а в 19 лет создал механический калькулятор. Позже Паскаль провёл новаторские эксперименты с атмосферным давлением, сформулировал закон гидродинамики (Закон Паскаля) и разработал основы теории вероятностей. Его философский труд «Мысли» остались актуальным и сегодня. </text:span><text:span text:style-name="T5">[1, </text:span><text:span text:style-name="T9">2</text:span><text:span text:style-name="T5">]</text:span></text:p>
      <text:h text:style-name="P2" text:outline-level="3" loext:marker-style-name="T4"><text:span text:style-name="T5">3. «</text:span><text:span text:style-name="T9">Паскалина</text:span><text:span text:style-name="T5">» — </text:span><text:span text:style-name="T9">первый шаг к механизации вычислений</text:span></text:h>
      <text:p text:style-name="P5" loext:marker-style-name="T4"><text:span text:style-name="T4"><text:tab/>В 1642 году Паскаль создал «Паскалину» (Pascaline) — первую механическую вычислительную машину, способную выполнять сложение и вычитание. Устройство использовало систему шестерёнок с десятичными разрядами и автоматическим переносом единицы в старший разряд. Это был первый практический пример автоматизации вычислений.</text:span><text:span text:style-name="T4"/></text:p>
      <text:p text:style-name="P5"><text:span text:style-name="Strong_20_Emphasis"><text:span text:style-name="T13">Принцип работы:</text:span></text:span></text:p>
      <text:list text:style-name="WWNum1">
        <text:list-item>
          <text:p text:style-name="P6" loext:marker-style-name="T4"><text:span text:style-name="T4">Каждое колесо отвечало за один разряд числа (единицы, десятки и т.д.).</text:span><text:span text:style-name="T4"/></text:p>
        </text:list-item>
        <text:list-item>
          <text:p text:style-name="P6" loext:marker-style-name="T4"><text:span text:style-name="T4">При полном обороте колеса младшего разряда колесо старшего разряда сдвигалось на одну позицию.</text:span><text:span text:style-name="T4"/></text:p>
        </text:list-item>
        <text:list-item>
          <text:p text:style-name="P6" loext:marker-style-name="T4"><text:span text:style-name="T4">Машина могла оперировать числами до 999 999.</text:span><text:span text:style-name="T4"/></text:p>
        </text:list-item>
      </text:list>
      <text:p text:style-name="P5"><text:span text:style-name="Strong_20_Emphasis"><text:span text:style-name="T13">Значение изобретения:</text:span></text:span></text:p>
      <text:list text:style-name="WWNum2">
        <text:list-item>
          <text:p text:style-name="P7" loext:marker-style-name="T4"><text:soft-page-break/><text:span text:style-name="T4">Доказательство возможности механизации вычислений.</text:span><text:span text:style-name="T4"/></text:p>
        </text:list-item>
        <text:list-item>
          <text:p text:style-name="P7" loext:marker-style-name="T4"><text:span text:style-name="T4">Влияние на последующие разработки (например, машины Лейбница).</text:span><text:span text:style-name="T4"/></text:p>
        </text:list-item>
        <text:list-item>
          <text:p text:style-name="P7" loext:marker-style-name="T4"><text:span text:style-name="T4">Символическое начало эры вычислительной техники. </text:span><text:span text:style-name="T5">[3]</text:span></text:p>
        </text:list-item>
      </text:list>
      <text:p text:style-name="P11" loext:marker-style-name="T4"/>
      <text:p text:style-name="P10" loext:marker-style-name="T14"><text:span text:style-name="T14">4. Теоретическое наследие: от машины к языку программирования</text:span><text:span text:style-name="T14"/></text:p>
      <text:p text:style-name="P5" loext:marker-style-name="T4"><text:span text:style-name="T4"><text:tab/>Паскаль повлиял на информатику не только через оборудование, но и через программное обеспечение. В 1970 году Никлаус Вирт назвал свой язык программирования Pascal в честь Блеза Паскаля. Этот язык стал стандартом для обучения структурному программированию благодаря своей стройности и логичности.</text:span><text:span text:style-name="T4"/></text:p>
      <text:p text:style-name="P5"><text:span text:style-name="Strong_20_Emphasis"><text:span text:style-name="T13">Прямое влияние:</text:span></text:span></text:p>
      <text:list text:style-name="WWNum3">
        <text:list-item>
          <text:p text:style-name="P8" loext:marker-style-name="T4"><text:span text:style-name="T4">Язык Pascal использовался в образовании и промышленности десятилетия.</text:span><text:span text:style-name="T4"/></text:p>
        </text:list-item>
        <text:list-item>
          <text:p text:style-name="P8" loext:marker-style-name="T4"><text:span text:style-name="T4">Modern языки (например, Delphi) унаследовали его принципы.</text:span><text:span text:style-name="T4"/></text:p>
        </text:list-item>
        <text:list-item>
          <text:p text:style-name="P8" loext:marker-style-name="T4"><text:span text:style-name="T4">Идеи Паскаля о чёткости и структуре актуальны в разработка программного обеспечения. </text:span><text:span text:style-name="T5">[4]</text:span></text:p>
        </text:list-item>
      </text:list>
      <text:p text:style-name="P10" loext:marker-style-name="T14"><text:span text:style-name="T11">5</text:span><text:span text:style-name="T7">. Научные достижения в математике и физике</text:span></text:p>
      <text:p text:style-name="P5" loext:marker-style-name="T4"><text:span text:style-name="T4"><text:tab/>Прежде чем обратиться к вычислительным машинам, Паскаль сделал несколько новаторских вкладов в чистой науке:</text:span><text:span text:style-name="T4"/></text:p>
      <text:list text:style-name="WWNum4">
        <text:list-item>
          <text:p text:style-name="P9"><text:span text:style-name="Strong_20_Emphasis"><text:span text:style-name="T13">Трактат о конических сечениях (1640):</text:span></text:span><text:span text:style-name="T4"> Работа, написанная им в 16 лет, вводила понятие "мистическая гексаграмма" и повлияла на развитие проективной геометрии.</text:span></text:p>
        </text:list-item>
        <text:list-item>
          <text:p text:style-name="P9"><text:span text:style-name="Strong_20_Emphasis"><text:span text:style-name="T13">Эксперименты с атмосферным давлением:</text:span></text:span><text:span text:style-name="T4"> Паскаль доказал существование вакуума, что противоречило догматам аристотелевской физики. Его эксперименты на горе Пюи-де-Дом стали классический пример научного метода.</text:span></text:p>
        </text:list-item>
        <text:list-item>
          <text:p text:style-name="P9"><text:span text:style-name="Strong_20_Emphasis"><text:span text:style-name="T13">Закон Паскаля:</text:span></text:span><text:span text:style-name="T4"> Фундаментальный принцип гидростатики, утверждающий, что давление, приложенное к замкнутой жидкости, передается поровну во всех направлениях. Этот принцип позже использовался в аналоговых компьютерах и гидравлических системах.</text:span></text:p>
        </text:list-item>
      </text:list>
      <text:p text:style-name="P5" loext:marker-style-name="T4"><text:span text:style-name="T4">Эти достижения показывают его системный подход к решению проблем — качество, необходимое для создания сложные вычислительные устройств.</text:span><text:span text:style-name="T4"/></text:p>
      <text:p text:style-name="P12" loext:marker-style-name="T16"/>
      <text:p text:style-name="P10" loext:marker-style-name="T4"><text:soft-page-break/><text:span text:style-name="T11">6. Заключение</text:span><text:span text:style-name="T11"/></text:p>
      <text:p text:style-name="P10" loext:marker-style-name="T4"><text:span text:style-name="T4"><text:s text:c="4"/>Блез Паскаль был новатором, чьи работы предвосхитили ключевые понятия компьютерной эры. Его «Паскалина» стала прообразом современных калькуляторов и компьютеров, а его математические и философские труды продолжают вдохновлять учёных. Имя Паскаля увековечено не только в истории науки, но и в названии одного из самых влиятельный языков программирования. Его наследие напоминает нам, что технологический прогресс часто начинается с идей гениальных людей.</text:span><text:span text:style-name="T4"/></text:p>
      <text:h text:style-name="P2" text:outline-level="3" loext:marker-style-name="T1"><text:span text:style-name="T15">Список литературы и интернет-источников</text:span><text:span text:style-name="T15"/></text:h>
      <text:p text:style-name="P4" loext:marker-style-name="T17"/>
      <text:h text:style-name="P1" text:outline-level="1" loext:marker-style-name="T17"><text:span text:style-name="T12">1. Blaise Pascal, статья в </text:span><text:span text:style-name="T8">Britanica. </text:span><text:span text:style-name="T6">// </text:span><text:a xlink:type="simple" xlink:href="https://www.britannica.com/biography/Blaise-Pascal" text:style-name="Internet_20_link" text:visited-style-name="Visited_20_Internet_20_Link"><text:span text:style-name="Internet_20_Link"><text:span text:style-name="T6">https://www.britannica.com/biography/Blaise-Pascal</text:span></text:span></text:a></text:h>
      <text:p text:style-name="P5"><text:span text:style-name="T10">2. </text:span><text:span text:style-name="T4">Blaise Pascal – Полная биография, история и изобретения // </text:span><text:span text:style-name="Internet_20_Link"><text:span text:style-name="T4">https://history-computer.com/people/blaise-pascal-complete-biography</text:span></text:span></text:p>
      <text:p text:style-name="P5" loext:marker-style-name="T4"><text:span text:style-name="T5">3. </text:span><text:bookmark text:name="firstHeading"/><text:span text:style-name="T4">Суммирующая машина Паскаля. // </text:span><text:span text:style-name="T5">https://руни.рф/Суммирующая_машина_Паскаля</text:span></text:p>
      <text:p text:style-name="P5"><text:span text:style-name="T5">4. </text:span><text:span text:style-name="T9">Официальная документация </text:span><text:span text:style-name="T5">Pascal. // </text:span><text:span text:style-name="Internet_20_Link"><text:span text:style-name="T5">https://www.freepascal.org</text:span></text:span></text:p>
      <text:p text:style-name="P5"><text:span text:style-name="T9">5. 10 основных открытий Блеза Паскаля. // </text:span><text:span text:style-name="Internet_20_Link"><text:span text:style-name="T5">https://translated.turbopages.org/proxy_u/en-ru.ru.33595762-68cae544-90c0f31b-74722d776562/https/learnodo-newtonic.com/blaise-pascal-contribution</text:span></text:span></text:p>
      <text:p text:style-name="P13" loext:marker-style-name="T16"/>
      <text:p text:style-name="P14" loext:marker-style-name="T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fo:language="en" fo:country="US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1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9:56:20</meta:creation-date>
    <dc:language>ru-RU</dc:language>
    <dc:date>2025-09-17T22:03:47.128000000</dc:date>
    <meta:editing-cycles>2</meta:editing-cycles>
    <meta:editing-duration>PT16M17S</meta:editing-duration>
    <meta:generator>LibreOffice/24.2.5.2$Windows_X86_64 LibreOffice_project/bffef4ea93e59bebbeaf7f431bb02b1a39ee8a59</meta:generator>
    <meta:document-statistic meta:table-count="0" meta:image-count="0" meta:object-count="0" meta:page-count="3" meta:paragraph-count="35" meta:word-count="571" meta:character-count="4651" meta:non-whitespace-character-count="4111"/>
    <meta:user-defined meta:name="AppVersion">15.0000</meta:user-defined>
  </office:meta>
</office:document-meta>
</file>