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automatic-styles>
    <style:style style:name="T1" style:family="text">
      <style:text-properties fo:font-variant="normal" fo:text-transform="none" fo:color="#ffffff" loext:opacity="100%" style:font-name="YS Text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IX в. - Образование Древнерусского государства.</text:p>
      <text:p text:style-name="Standard">2) 862 г. - «Призвание варягов» на Русь.</text:p>
      <text:p text:style-name="Standard">3) <text:a xlink:type="simple" xlink:href="tel:862-879" office:target-frame-name="_blank" xlink:show="new" text:style-name="Internet_20_link" text:visited-style-name="Visited_20_Internet_20_Link">862-879</text:a> гг. - Княжение Рюрика в Новгороде.</text:p>
      <text:p text:style-name="Standard">4) 879 912 гг. - Княжение Олега в Киеве.</text:p>
      <text:p text:style-name="Standard">5) 882 г. - Объединение Новгорода и Киева в единое государство при князе Олеге.</text:p>
      <text:p text:style-name="Standard">6) 907, 911 гг. - Походы Олега на Царьград. Договоры с греками.</text:p>
      <text:p text:style-name="Standard">7) <text:a xlink:type="simple" xlink:href="tel:912-945" office:target-frame-name="_blank" xlink:show="new" text:style-name="Internet_20_link" text:visited-style-name="Visited_20_Internet_20_Link">912-945</text:a> гг. - Княжение Игоря в Киеве.</text:p>
      <text:p text:style-name="Standard">8) 945 г. - Восстание древлян.</text:p>
      <text:p text:style-name="Standard">9) 945 962 гг. - Правление княгини Ольги</text:p>
      <text:p text:style-name="Standard">10) 962 972 гг. - Княжение Святослава Игоревича.</text:p>
      <text:p text:style-name="Standard">11) <text:a xlink:type="simple" xlink:href="tel:964-972" office:target-frame-name="_blank" xlink:show="new" text:style-name="Internet_20_link" text:visited-style-name="Visited_20_Internet_20_Link">964-972</text:a> гг. - Военные походы князя Святослава.</text:p>
      <text:p text:style-name="Standard">12) <text:a xlink:type="simple" xlink:href="tel:980-1015" office:target-frame-name="_blank" xlink:show="new" text:style-name="Internet_20_link" text:visited-style-name="Visited_20_Internet_20_Link">980-1015</text:a> гг. - Княжение Владимира I Святославича Святого.</text:p>
      <text:p text:style-name="Standard">13) 988 г. Принятие христианства на Руси.</text:p>
      <text:p text:style-name="Standard">14) 1019-1054 гг. - Княжение Ярослава Мудрого.</text:p>
      <text:p text:style-name="Standard">15) 1097 г. - Съезд князей в Любече. Закрепление раздробленности Древнерусского государства.</text:p>
      <text:p text:style-name="Standard">16) 1113-1125 гг. - Великое княжение Владимира Мономаха в Киеве</text:p>
      <text:p text:style-name="Standard">17) 1125-1132 гг. княжение Мстислава в Киеве</text:p>
      <text:p text:style-name="Standard">18) 1125-1157 г. - Княжение Юрия Владимировича Долгорукого во Владимире.</text:p>
      <text:p text:style-name="Standard">19) 1147 г. - Первое упоминание о Москве в летописи.</text:p>
      <text:p text:style-name="Standard">20) 1157-1174 гг. - Княжение Андрея Юрьевича Боголюбского.</text:p>
      <text:p text:style-name="Standard">21) 1185 г. - Поход князя Игоря Новгород Северского на половцев. «Слово о полку Игореве».</text:p>
      <text:p text:style-name="Standard">22) 31 мая 1223 г. - Битва на реке Калке.</text:p>
      <text:p text:style-name="Standard">23) 1237-1240 гг. - Нашествие монголо-татар во главе с ханом Батыем на Русь.</text:p>
      <text:p text:style-name="Standard">24) 4 марта 1238 г. - Битва на реке Сити.</text:p>
      <text:p text:style-name="Standard"/>
      <text:p text:style-name="Standard">25) 15 июля 1240 г. - Невская битва. Разгром князем Александром Ярославичем шведских рыцарей на реке Неве. Прозван Невским.</text:p>
      <text:p text:style-name="Standard">26) 1240 г. - Разгром монголо-татарами Киева.</text:p>
      <text:p text:style-name="Standard">27)5 апреля 1242 г. - Ледовое побоище. Разгром князем Александром Ярославичем Невским крестоносцев на Чудском озере.</text:p>
      <text:p text:style-name="Standard">28) 1325-1340 гг. - Правление князя Ивана Калиты в Москве.</text:p>
      <text:p text:style-name="Standard">29) 1326 г. - Перенесение резиденции главы Русской православной церкви - митрополита - из Владимира в Москву, превращение Москвы в общерусский религиозный центр.</text:p>
      <text:p text:style-name="Standard">30) 1327 г. Восстание в Твери против золотоордынцев.</text:p>
      <text:p text:style-name="Standard">31) 1359-1389 гг. - Правление князя (с 1362 г. - великого князя) Дмитрия Ивановича (после 1380 г. - Донского) в Москве.</text:p>
      <text:p text:style-name="Standard">32) 1378 г. - Битва на реке Воже.</text:p>
      <text:p text:style-name="Standard">33)8 сентября 1380 г. - Куликовская битва.</text:p>
      <text:p text:style-name="Standard">34) 1382 г. - Разгром Москвы ханом Тохтамышем.</text:p>
      <text:p text:style-name="Standard">35) 1389-1425 гг. - Княжение Василия I Дмитриевича.</text:p>
      <text:p text:style-name="Standard">36) 1410 г., 15 июля. - Грюнвальдская битва. Разгром Тевтонского ордена.</text:p>
      <text:p text:style-name="Standard">37) 1425-1453 гг. - Династическая война между сыновьями и внуками Дмитрия Донского.</text:p>
      <text:p text:style-name="Standard">38) 1453 г. - Падение Византийской империи.</text:p>
      <text:p text:style-name="Standard">39) 1462-1505 гг. - Княжение Ивана II.</text:p>
      <text:p text:style-name="Standard">40) 1471 г. - Сражение на реке Шелони московских и новгородских войск.</text:p>
      <text:p text:style-name="Standard">41) 1478 г. - Присоединение Новгорода Великого к Москве.</text:p>
      <text:p text:style-name="Standard">42) 1480 г. - «Стояние на реке Угре». Ликвидация ордынского ига.</text:p>
      <text:p text:style-name="Standard">43) 1484-1508 гг. - Строительство нынешнего Московского Кремля. Сооружение соборов и Грановитой палаты, кирпичных стен.</text:p>
      <text:p text:style-name="Standard">44) 1485 г. - Присоединение Твери к Москве.</text:p>
      <text:p text:style-name="Standard"><text:soft-page-break/>45) 1497 г. - Составление «Судебника» Ивана III. Установление единых норм уголовной ответственности и судебно процессуальных норм для всей страны, ограничение права крестьянского перехода от одного феодала к другому - неделя до и неделя после 26 ноября (Юрьева дня осеннего).</text:p>
      <text:p text:style-name="Standard">46) Конец XV - начало XVI в. - Завершение процесса складывания Российского централизованного государства.</text:p>
      <text:p text:style-name="Standard">47) 1505 1533 гг. Правление Василия III.</text:p>
      <text:p text:style-name="Standard">48) 1533-1584 гг. - Правление великого князя Ивана IV Грозного.</text:p>
      <text:p text:style-name="Standard">49) 1547 г. - Венчание Ивана IV Грозного на царство.</text:p>
      <text:p text:style-name="Standard">50) 1549 г. - Начало созыва Земских соборов.</text:p>
      <text:p text:style-name="Standard">51) 1550 г. - Принятие «Судебника» Ивана IV Грозного.</text:p>
      <text:p text:style-name="Standard">52) 1551 г. - «Стоглавый собор» Русской православной церкви.</text:p>
      <text:p text:style-name="Standard">53) 1552 г. - Присоединение Казани к Москве.</text:p>
      <text:p text:style-name="Standard">54) 1556 г. - Присоединение Астрахани к Москве.</text:p>
      <text:p text:style-name="Standard">55) 1556 г. - Принятие «Уложения о службе».</text:p>
      <text:p text:style-name="Standard">56) 1558-1583 гг. - Ливонская война.</text:p>
      <text:p text:style-name="Standard">57) 1564 г. - Начало книгопечатания на Руси. Издание Иваном Федоровым «Апостола» - первой печатной книги, имеющей установленную дату.</text:p>
      <text:p text:style-name="Standard">58) 1565-1572 гг. - Опричнина Ивана IV Грозного.</text:p>
      <text:p text:style-name="Standard">59) 1581 г. - Первое упоминание о «заповедных летах».</text:p>
      <text:p text:style-name="Standard">60) 1581 г. - Поход Ермака в Сибирь.</text:p>
      <text:p text:style-name="Standard">61) 1582 г. - Подписание Ям-Запольского перемирия России с Речью Посполитой.</text:p>
      <text:p text:style-name="Standard">62) 1583 г. - Заключение Плюсского перемирия со Швецией.</text:p>
      <text:p text:style-name="Standard">63) 1584 1598 гг. - Царствование Федора Иоанновича.</text:p>
      <text:p text:style-name="Standard">64) 1589 г. - Учреждение патриаршества на Руси. Патриарх Иов.</text:p>
      <text:p text:style-name="Standard">65) 1597 г. - Указ об «урочных летах» (пятилетнем сроке сыска беглых крестьян).</text:p>
      <text:p text:style-name="Standard">66) 1598-1605 гг. - Правление Бориса Годунова.</text:p>
      <text:p text:style-name="Standard">67) 1603 г. - Восстание крестьян и холопов под предводительством Хлопка.</text:p>
      <text:p text:style-name="Standard">68) 1605-1606 гг. - Правление Лжедмитрия I.</text:p>
      <text:p text:style-name="Standard">69) 1606-1607 гг. - Восстание крестьян под предводительством Ивана Болотникова.</text:p>
      <text:p text:style-name="Standard">70) 1606-1610 гг. - Правление царя Василия Шуйског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9T23:07:18.845000000</meta:creation-date>
    <meta:print-date>2025-10-19T23:09:12.700000000</meta:print-date>
    <dc:date>2025-10-19T23:12:53.193000000</dc:date>
    <meta:editing-duration>PT5M33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70" meta:word-count="726" meta:character-count="4482" meta:non-whitespace-character-count="3826"/>
  </office:meta>
</office:document-meta>
</file>